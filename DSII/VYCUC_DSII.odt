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02c14c" officeooo:paragraph-rsid="0002c14c" style:font-size-asian="40pt" style:font-size-complex="40pt"/>
    </style:style>
    <style:style style:name="P2" style:family="paragraph" style:parent-style-name="Standard">
      <style:paragraph-properties fo:text-align="start" style:justify-single-word="false"/>
      <style:text-properties fo:font-size="12pt" officeooo:rsid="0002c14c" officeooo:paragraph-rsid="0002c14c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officeooo:rsid="0002c14c" officeooo:paragraph-rsid="0002c14c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2c14c" officeooo:paragraph-rsid="0002c14c"/>
    </style:style>
    <style:style style:name="P5" style:family="paragraph" style:parent-style-name="Standard">
      <style:paragraph-properties fo:text-align="start" style:justify-single-word="false"/>
      <style:text-properties officeooo:rsid="0002c14c" officeooo:paragraph-rsid="0002c14c"/>
    </style:style>
    <style:style style:name="P6" style:family="paragraph" style:parent-style-name="Standard" style:list-style-name="L2">
      <style:paragraph-properties fo:text-align="start" style:justify-single-word="false"/>
      <style:text-properties officeooo:rsid="0002c14c" officeooo:paragraph-rsid="0002c14c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039cee" officeooo:paragraph-rsid="00039cee"/>
    </style:style>
    <style:style style:name="P8" style:family="paragraph" style:parent-style-name="Standard" style:list-style-name="L2">
      <style:paragraph-properties fo:text-align="start" style:justify-single-word="false"/>
      <style:text-properties fo:color="#000000" loext:opacity="100%" officeooo:rsid="00039cee" officeooo:paragraph-rsid="00039cee" fo:background-color="transparent"/>
    </style:style>
    <style:style style:name="P9" style:family="paragraph" style:parent-style-name="Standard" style:list-style-name="L2">
      <style:paragraph-properties fo:text-align="start" style:justify-single-word="false"/>
      <style:text-properties fo:color="#000000" loext:opacity="100%" officeooo:rsid="000536ee" officeooo:paragraph-rsid="000536ee" fo:background-color="transparent"/>
    </style:style>
    <style:style style:name="P10" style:family="paragraph" style:parent-style-name="Standard" style:list-style-name="L2">
      <style:paragraph-properties fo:text-align="start" style:justify-single-word="false"/>
      <style:text-properties fo:color="#000000" loext:opacity="100%" officeooo:rsid="00066357" officeooo:paragraph-rsid="00066357" fo:background-color="transparen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officeooo:rsid="00066357" officeooo:paragraph-rsid="00066357" fo:background-color="transparent"/>
    </style:style>
    <style:style style:name="T1" style:family="text">
      <style:text-properties fo:language="cs" fo:country="CZ"/>
    </style:style>
    <style:style style:name="T2" style:family="text">
      <style:text-properties fo:color="#000000" loext:opacity="100%" fo:background-color="#ff8000" loext:char-shading-value="0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background-color="#ff8000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S2 – výcuc</text:p>
      <text:p text:style-name="P2">Dále se čísluje podle přednášek</text:p>
      <text:p text:style-name="P3"/>
      <text:list text:style-name="L1">
        <text:list-item>
          <text:p text:style-name="P4">V oracle NENÍ <text:span text:style-name="T1">implicitní</text:span> <text:span text:style-name="T1">formát</text:span> datumu, existuje DATE a TIMESTAMP</text:p>
        </text:list-item>
      </text:list>
      <text:p text:style-name="P5">Při odečtení dvou dat nám returnuje počet dní mezi daty. Pokud chceme převést na nižší hodnoty (sekundy, minuty, hodiny) musíme násobit, pokud chceme měsíce musíme použít funkci months_between()</text:p>
      <text:p text:style-name="P5">Pokud chceme z data vytáhnout čas musíme ho přetypovat pomocí CAST() na timestamp, až potom můžeme použít extract(hour,minute,second apod.)</text:p>
      <text:p text:style-name="P5"/>
      <text:p text:style-name="P5">Další funkce: floor,ceil,round,trunc,substr,len A DBMS_RANDOM.VALUE(min,max)</text:p>
      <text:p text:style-name="P5"/>
      <text:list text:style-name="L2">
        <text:list-item>
          <text:p text:style-name="P6">Syntaxe PL/SQL založena na jazyce ADA</text:p>
          <text:p text:style-name="P6">výhody,nevýhody PL/SQL: + kombinace proc. Logiky a sql, + menší přenos dat (kód uložen v DBS), +sdílení kódu mezi aplikacemi, -nepřenositelnost mezi DBS jiných výrobců, -nižší efektivita</text:p>
          <text:p text:style-name="P6">Struktura PL/SQL bloku: Declare, Begin, Exception, End</text:p>
          <text:p text:style-name="P7">Declare: <text:span text:style-name="T2">jmeno_promenne typ_promenne [NOT NULL := hodnota];</text:span></text:p>
          <text:p text:style-name="P8">Pokud jsou ve výstupu příliš dlouhé řádky, můžeme bez úpravy dotazu zmenšit (formátovat) výstup:<text:line-break/>column fname format a14 <text:span text:style-name="T3">←</text:span> velikost</text:p>
          <text:p text:style-name="P8">Při deklaraci proměnné můžeme použít v_variable Table.Value%TYPE, které zkopíruje dat. Typ z Table.Value a %ROWTYPE kopíruje Záznam z určité tabulky (Table%ROWTYPE) proměnná tudíž reprezentuje jeden záznam</text:p>
          <text:p text:style-name="P8">Transakce je databázová operace, obsahující více elementárních databázových operací, která: <text:span text:style-name="T4">1) proběhne celá nebo není proveden žádný příkaz transakce.</text:span> <text:span text:style-name="T4">2) proběhne celá nad stejnou databází, jaká byla na začátku transakce</text:span></text:p>
          <text:p text:style-name="P9">Pokud uživatel zapomene potvrdit příkazem commit nebo zrušit příkazem rollback, tabulka zůstane uzamčena po ukončení session, potom při dalším přihlášení a přístupu k tabulce dostaneme exception: timeout occurred while waiting to lock object (řešení je killnout tuto session)</text:p>
        </text:list-item>
        <text:list-item>
          <text:p text:style-name="P9">3 typy procedur (anonymní, pojmenované, pojmenované funkce)</text:p>
          <text:p text:style-name="P9">Anonymní: Nejsou při deklaraci pojmenované, nejsou předkompilované, proto můžou být pomalejší</text:p>
          <text:p text:style-name="P9">Pojmenované: Při deklaraci obsahují hlavičku se jménem a parametry, je jí možno volat z jiných procedur nebo pomocí EXECUTE (EXEC), tyhle jsou již předkompilování a uložený v DBS</text:p>
          <text:p text:style-name="P9">Funkce: Hodně podobné procedurám, ale specifikují návratový typ a MUSÍ vracet hodnotu</text:p>
        </text:list-item>
        <text:list-item>
          <text:p text:style-name="P10">Kurzory – pomocné proměnné vytvořené po provedení nějakého SQL příkazu. Umožní procházet výsledek příkazu. Jsou dva typy:<text:line-break/>1) Implicitní kurzor – Vytváří se autmaticky po provedení příkazů (insert,del,update)</text:p>
          <text:p text:style-name="P10">2) Explicitní kurzor – Deklaruje a definuje se jako proměnná. Čast spojen s příkazem SELECT (vrací více než jeden řádek) CURSOR jmeno IS prikaz_select</text:p>
          <text:p text:style-name="P10">Práce s kurzorem: OPEN jmeno – nastaví první záznam výsledku,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">FETCH jmeno INTO promenna – načte aktuální záznam do proměnné, posune se dál</text:p>
                              <text:p text:style-name="P10">CLOSE jmeno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30T14:39:47.932075200</meta:creation-date>
    <dc:date>2026-05-30T15:33:34.658425100</dc:date>
    <meta:editing-duration>PT20M55S</meta:editing-duration>
    <meta:editing-cycles>1</meta:editing-cycles>
    <meta:document-statistic meta:table-count="0" meta:image-count="0" meta:object-count="0" meta:page-count="1" meta:paragraph-count="24" meta:word-count="364" meta:character-count="2614" meta:non-whitespace-character-count="2269"/>
    <meta:generator>LibreOffice/25.8.6.2$Windows_X86_64 LibreOffice_project/b4b39682cd9868fa725bc664aff94278d315bd04</meta:generator>
  </office:meta>
</office:document-meta>
</file>